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version">
        <table:table-row>
          <table:table-cell office:value-type="string">
            <text:p>VENDOR</text:p>
          </table:table-cell>
          <table:table-cell office:value-type="string">
            <text:p>LIBRARY</text:p>
          </table:table-cell>
          <table:table-cell office:value-type="string">
            <text:p>NAME</text:p>
          </table:table-cell>
          <table:table-cell office:value-type="string">
            <text:p>VERSION</text:p>
          </table:table-cell>
          <table:table-cell office:value-type="string">
            <text:p>DESC</text:p>
          </table:table-cell>
        </table:table-row>
        <table:table-row>
          <table:table-cell office:value-type="string">
            <text:p>example.com</text:p>
          </table:table-cell>
          <table:table-cell office:value-type="string">
            <text:p>IP</text:p>
          </table:table-cell>
          <table:table-cell office:value-type="string">
            <text:p>example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address_map">
        <table:table-row>
          <table:table-cell office:value-type="string">
            <text:p>BLOCK</text:p>
          </table:table-cell>
          <table:table-cell office:value-type="string">
            <text:p>OFFSET</text:p>
          </table:table-cell>
          <table:table-cell office:value-type="string">
            <text:p>RANGE</text:p>
          </table:table-cell>
          <table:table-cell office:value-type="string">
            <text:p>DESC</text:p>
          </table:table-cell>
        </table:table-row>
        <table:table-row>
          <table:table-cell office:value-type="string">
            <text:p>block0</text:p>
          </table:table-cell>
          <table:table-cell office:value-type="string">
            <text:p>0x0</text:p>
          </table:table-cell>
          <table:table-cell office:value-type="string">
            <text:p>0x1000</text:p>
          </table:table-cell>
        </table:table-row>
        <table:table-row>
          <table:table-cell office:value-type="string">
            <text:p>block1</text:p>
          </table:table-cell>
          <table:table-cell office:value-type="string">
            <text:p>0x1000</text:p>
          </table:table-cell>
          <table:table-cell office:value-type="string">
            <text:p>0x1000</text:p>
          </table:table-cell>
        </table:table-row>
      </table:table>
      <table:table table:name="block0">
        <table:table-row>
          <table:table-cell office:value-type="string">
            <text:p>ADDR</text:p>
          </table:table-cell>
          <table:table-cell office:value-type="string">
            <text:p>REG</text:p>
          </table:table-cell>
          <table:table-cell office:value-type="string">
            <text:p>REG_DESC</text:p>
          </table:table-cell>
          <table:table-cell office:value-type="string">
            <text:p>FIELD</text:p>
          </table:table-cell>
          <table:table-cell office:value-type="string">
            <text:p>BIT</text:p>
          </table:table-cell>
          <table:table-cell office:value-type="string">
            <text:p>ATTR</text:p>
          </table:table-cell>
          <table:table-cell office:value-type="string">
            <text:p>RESET</text:p>
          </table:table-cell>
          <table:table-cell office:value-type="string">
            <text:p>FIELD_DESC</text:p>
          </table:table-cell>
        </table:table-row>
        <table:table-row>
          <table:table-cell office:value-type="string">
            <text:p>0x0</text:p>
          </table:table-cell>
          <table:table-cell office:value-type="string">
            <text:p>reg0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RW</text:p>
          </table:table-cell>
          <table:table-cell office:value-type="string">
            <text:p>0x1234</text:p>
          </table:table-cell>
          <table:table-cell office:value-type="string">
            <text:p>reg0.field0</text:p>
          </table:table-cell>
        </table:table-row>
        <table:table-row>
          <table:table-cell office:value-type="string">
            <text:p>0x4</text:p>
          </table:table-cell>
          <table:table-cell office:value-type="string">
            <text:p>reg1</text:p>
          </table:table-cell>
          <table:table-cell office:value-type="string">
            <text:p/>
          </table:table-cell>
          <table:table-cell office:value-type="string">
            <text:p>reserved1</text:p>
          </table:table-cell>
          <table:table-cell office:value-type="string">
            <text:p>[31:24]</text:p>
          </table:table-cell>
          <table:table-cell office:value-type="string">
            <text:p>R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eld1</text:p>
          </table:table-cell>
          <table:table-cell office:value-type="string">
            <text:p>[23:16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rved0</text:p>
          </table:table-cell>
          <table:table-cell office:value-type="string">
            <text:p>[15:8]</text:p>
          </table:table-cell>
          <table:table-cell office:value-type="string">
            <text:p>R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7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0x8</text:p>
          </table:table-cell>
          <table:table-cell office:value-type="string">
            <text:p>reg2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W1C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0xc</text:p>
          </table:table-cell>
          <table:table-cell office:value-type="string">
            <text:p>reg3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RC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0x10</text:p>
          </table:table-cell>
          <table:table-cell office:value-type="string">
            <text:p>rega{n}, n=range(3)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0x20</text:p>
          </table:table-cell>
          <table:table-cell office:value-type="string">
            <text:p>regb{n}, n=range(0, 2)</text:p>
          </table:table-cell>
          <table:table-cell office:value-type="string">
            <text:p/>
          </table:table-cell>
          <table:table-cell office:value-type="string">
            <text:p>field1</text:p>
          </table:table-cell>
          <table:table-cell office:value-type="string">
            <text:p>[31:16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15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lock1">
        <table:table-row>
          <table:table-cell office:value-type="string">
            <text:p>ADDR</text:p>
          </table:table-cell>
          <table:table-cell office:value-type="string">
            <text:p>REG</text:p>
          </table:table-cell>
          <table:table-cell office:value-type="string">
            <text:p>REG_DESC</text:p>
          </table:table-cell>
          <table:table-cell office:value-type="string">
            <text:p>FIELD</text:p>
          </table:table-cell>
          <table:table-cell office:value-type="string">
            <text:p>BIT</text:p>
          </table:table-cell>
          <table:table-cell office:value-type="string">
            <text:p>ATTR</text:p>
          </table:table-cell>
          <table:table-cell office:value-type="string">
            <text:p>RESET</text:p>
          </table:table-cell>
          <table:table-cell office:value-type="string">
            <text:p>FIELD_DESC</text:p>
          </table:table-cell>
        </table:table-row>
        <table:table-row>
          <table:table-cell office:value-type="string">
            <text:p>0x0</text:p>
          </table:table-cell>
          <table:table-cell office:value-type="string">
            <text:p>reg0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RW</text:p>
          </table:table-cell>
          <table:table-cell office:value-type="string">
            <text:p>0x1234</text:p>
          </table:table-cell>
        </table:table-row>
        <table:table-row>
          <table:table-cell office:value-type="string">
            <text:p>0x4</text:p>
          </table:table-cell>
          <table:table-cell office:value-type="string">
            <text:p>reg1</text:p>
          </table:table-cell>
          <table:table-cell office:value-type="string">
            <text:p/>
          </table:table-cell>
          <table:table-cell office:value-type="string">
            <text:p>reserved1</text:p>
          </table:table-cell>
          <table:table-cell office:value-type="string">
            <text:p>[31:24]</text:p>
          </table:table-cell>
          <table:table-cell office:value-type="string">
            <text:p>R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eld1</text:p>
          </table:table-cell>
          <table:table-cell office:value-type="string">
            <text:p>[23:16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rved0</text:p>
          </table:table-cell>
          <table:table-cell office:value-type="string">
            <text:p>[15:8]</text:p>
          </table:table-cell>
          <table:table-cell office:value-type="string">
            <text:p>R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7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x8</text:p>
          </table:table-cell>
          <table:table-cell office:value-type="string">
            <text:p>reg2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W1C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xc</text:p>
          </table:table-cell>
          <table:table-cell office:value-type="string">
            <text:p>reg3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RC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x10</text:p>
          </table:table-cell>
          <table:table-cell office:value-type="string">
            <text:p>rega{n}, n=range(1, 3)</text:p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31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x20</text:p>
          </table:table-cell>
          <table:table-cell office:value-type="string">
            <text:p>regb{n}, n=range(0, 2, 8)</text:p>
          </table:table-cell>
          <table:table-cell office:value-type="string">
            <text:p/>
          </table:table-cell>
          <table:table-cell office:value-type="string">
            <text:p>field1</text:p>
          </table:table-cell>
          <table:table-cell office:value-type="string">
            <text:p>[31:16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15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x30</text:p>
          </table:table-cell>
          <table:table-cell office:value-type="string">
            <text:p>regc{n}, n=range(3)</text:p>
          </table:table-cell>
          <table:table-cell office:value-type="string">
            <text:p/>
          </table:table-cell>
          <table:table-cell office:value-type="string">
            <text:p>field1</text:p>
          </table:table-cell>
          <table:table-cell office:value-type="string">
            <text:p>[31:16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eld0</text:p>
          </table:table-cell>
          <table:table-cell office:value-type="string">
            <text:p>[15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x100</text:p>
          </table:table-cell>
          <table:table-cell office:value-type="string">
            <text:p>regd{n}, n=range(0, 2, 16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31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x200</text:p>
          </table:table-cell>
          <table:table-cell office:value-type="string">
            <text:p>rege{n}, n=range(0, 2, 8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63:0]</text:p>
          </table:table-cell>
          <table:table-cell office:value-type="string">
            <text:p>RW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